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bold" officeooo:rsid="000013a4" officeooo:paragraph-rsid="000013a4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officeooo:rsid="000013a4" officeooo:paragraph-rsid="000013a4" style:font-size-asian="10.5pt" style:font-size-complex="10.5pt"/>
    </style:style>
    <style:style style:name="P3" style:family="paragraph" style:parent-style-name="Standard">
      <style:text-properties fo:font-size="9pt" officeooo:rsid="000013a4" officeooo:paragraph-rsid="000013a4" style:font-size-asian="9pt" style:font-size-complex="9pt"/>
    </style:style>
    <style:style style:name="P4" style:family="paragraph" style:parent-style-name="Standard">
      <style:text-properties fo:font-size="9pt" fo:font-weight="normal" officeooo:rsid="000013a4" officeooo:paragraph-rsid="000013a4" style:font-size-asian="9pt" style:font-weight-asian="normal" style:font-size-complex="9pt" style:font-weight-complex="normal"/>
    </style:style>
    <style:style style:name="P5" style:family="paragraph">
      <style:paragraph-properties fo:text-align="center"/>
    </style:style>
    <style:style style:name="P6" style:family="paragraph" style:parent-style-name="Standard">
      <style:text-properties fo:font-size="9pt" fo:font-weight="bold" officeooo:rsid="000013a4" officeooo:paragraph-rsid="000013a4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officeooo:rsid="00029248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MINA DEV ☀️</text:p>
      <text:p text:style-name="P2">Armbian Trixie Minimal</text:p>
      <text:p text:style-name="P3">Build: <text:span text:style-name="T1">June 3, 2026</text:span></text:p>
      <text:p text:style-name="P4"><draw:line text:anchor-type="paragraph" draw:z-index="0" draw:name="Horizontal line 1" draw:style-name="gr1" draw:text-style-name="P5" svg:x1="-0.0173in" svg:y1="0.0835in" svg:x2="2.0217in" svg:y2="0.0835in"><text:p/></draw:line></text:p>
      <text:p text:style-name="P6"><text:span text:style-name="T2">Login:</text:span> <text:s/><text:span text:style-name="T3">sol</text:span></text:p>
      <text:p text:style-name="P6"><text:span text:style-name="T2">Pass:</text:span> <text:s text:c="3"/><text:span text:style-name="T4">*************</text:span></text:p>
      <text:p text:style-name="P6"><draw:line text:anchor-type="paragraph" draw:z-index="1" draw:name="Horizontal line 2" draw:style-name="gr1" draw:text-style-name="P5" svg:x1="-0.0173in" svg:y1="0.0835in" svg:x2="2.0217in" svg:y2="0.0835in"><text:p/></draw:line></text:p>
      <text:p text:style-name="P6">https://github.com/choyer/lum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20:34:26.462211031</meta:creation-date>
    <meta:print-date>2026-06-04T20:41:40.529080172</meta:print-date>
    <dc:date>2026-06-05T10:55:28.535589960</dc:date>
    <meta:editing-duration>PT14H2S</meta:editing-duration>
    <meta:editing-cycles>1</meta:editing-cycles>
    <meta:document-statistic meta:table-count="0" meta:image-count="0" meta:object-count="0" meta:page-count="1" meta:paragraph-count="6" meta:word-count="15" meta:character-count="118" meta:non-whitespace-character-count="105"/>
    <meta:generator>LibreOffice/26.2.3.2$Linux_X86_64 LibreOffice_project/620$Build-2</meta:generator>
  </office:meta>
</office:document-meta>
</file>